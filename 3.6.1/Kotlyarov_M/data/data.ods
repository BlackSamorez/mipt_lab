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\nu_n^{теор}, кГц</text:p>
          </table:table-cell>
          <table:table-cell office:value-type="float" office:value="1.04" calcext:value-type="float">
            <text:p>1,04</text:p>
          </table:table-cell>
          <table:table-cell office:value-type="float" office:value="2.004" calcext:value-type="float">
            <text:p>2,004</text:p>
          </table:table-cell>
          <table:table-cell office:value-type="float" office:value="3.017" calcext:value-type="float">
            <text:p>3,017</text:p>
          </table:table-cell>
          <table:table-cell office:value-type="float" office:value="3.988" calcext:value-type="float">
            <text:p>3,988</text:p>
          </table:table-cell>
          <table:table-cell office:value-type="float" office:value="4.994" calcext:value-type="float">
            <text:p>4,994</text:p>
          </table:table-cell>
          <table:table-cell office:value-type="float" office:value="6.001" calcext:value-type="float">
            <text:p>6,001</text:p>
          </table:table-cell>
          <table:table-cell office:value-type="float" office:value="7.008" calcext:value-type="float">
            <text:p>7,008</text:p>
          </table:table-cell>
          <table:table-cell office:value-type="float" office:value="7.978" calcext:value-type="float">
            <text:p>7,978</text:p>
          </table:table-cell>
        </table:table-row>
        <table:table-row table:style-name="ro1">
          <table:table-cell office:value-type="string" calcext:value-type="string">
            <text:p>\nu_n^{эксп}, кГц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|a_n|^{эксп}, мВ</text:p>
          </table:table-cell>
          <table:table-cell office:value-type="float" office:value="283.3" calcext:value-type="float">
            <text:p>283,3</text:p>
          </table:table-cell>
          <table:table-cell office:value-type="float" office:value="278.1" calcext:value-type="float">
            <text:p>278,1</text:p>
          </table:table-cell>
          <table:table-cell office:value-type="float" office:value="272.2" calcext:value-type="float">
            <text:p>272,2</text:p>
          </table:table-cell>
          <table:table-cell office:value-type="float" office:value="260.4" calcext:value-type="float">
            <text:p>260,4</text:p>
          </table:table-cell>
          <table:table-cell office:value-type="float" office:value="246.5" calcext:value-type="float">
            <text:p>246,5</text:p>
          </table:table-cell>
          <table:table-cell office:value-type="float" office:value="231.2" calcext:value-type="float">
            <text:p>231,2</text:p>
          </table:table-cell>
          <table:table-cell office:value-type="float" office:value="213.9" calcext:value-type="float">
            <text:p>213,9</text:p>
          </table:table-cell>
          <table:table-cell office:value-type="float" office:value="195.1" calcext:value-type="float">
            <text:p>195,1</text:p>
          </table:table-cell>
        </table:table-row>
        <table:table-row table:style-name="ro1">
          <table:table-cell office:value-type="string" calcext:value-type="string">
            <text:p>|a_n/a_1|^{эксп}, мВ</text:p>
          </table:table-cell>
          <table:table-cell office:value-type="float" office:value="1" calcext:value-type="float">
            <text:p>1</text:p>
          </table:table-cell>
          <table:table-cell table:formula="of:=[.C6]/[.$B$6]" office:value-type="float" office:value="0.98164489939993" calcext:value-type="float">
            <text:p>0,98164489939993</text:p>
          </table:table-cell>
          <table:table-cell table:formula="of:=[.D6]/[.$B$6]" office:value-type="float" office:value="0.960818919872926" calcext:value-type="float">
            <text:p>0,960818919872926</text:p>
          </table:table-cell>
          <table:table-cell table:formula="of:=[.E6]/[.$B$6]" office:value-type="float" office:value="0.91916696081892" calcext:value-type="float">
            <text:p>0,91916696081892</text:p>
          </table:table-cell>
          <table:table-cell table:formula="of:=[.F6]/[.$B$6]" office:value-type="float" office:value="0.870102364984116" calcext:value-type="float">
            <text:p>0,870102364984116</text:p>
          </table:table-cell>
          <table:table-cell table:formula="of:=[.G6]/[.$B$6]" office:value-type="float" office:value="0.816096011295446" calcext:value-type="float">
            <text:p>0,816096011295446</text:p>
          </table:table-cell>
          <table:table-cell table:formula="of:=[.H6]/[.$B$6]" office:value-type="float" office:value="0.755030003529827" calcext:value-type="float">
            <text:p>0,755030003529827</text:p>
          </table:table-cell>
          <table:table-cell table:formula="of:=[.I6]/[.$B$6]" office:value-type="float" office:value="0.688669255206495" calcext:value-type="float">
            <text:p>0,688669255206495</text:p>
          </table:table-cell>
        </table:table-row>
        <table:table-row table:style-name="ro1">
          <table:table-cell office:value-type="string" calcext:value-type="string">
            <text:p>|a_n/a_1|^{теор}, мВ</text:p>
          </table:table-cell>
          <table:table-cell office:value-type="float" office:value="1" calcext:value-type="float">
            <text:p>1</text:p>
          </table:table-cell>
          <table:table-cell table:formula="of:=SIN(PI()*[.C3]/20)/SIN(PI()/20)/[.C3]" office:value-type="float" office:value="0.987688340595138" calcext:value-type="float">
            <text:p>0,987688340595138</text:p>
          </table:table-cell>
          <table:table-cell table:formula="of:=SIN(PI()*[.D3]/20)/SIN(PI()/20)/[.D3]" office:value-type="float" office:value="0.967371010863436" calcext:value-type="float">
            <text:p>0,967371010863436</text:p>
          </table:table-cell>
          <table:table-cell table:formula="of:=SIN(PI()*[.E3]/20)/SIN(PI()/20)/[.E3]" office:value-type="float" office:value="0.939347432391753" calcext:value-type="float">
            <text:p>0,939347432391753</text:p>
          </table:table-cell>
          <table:table-cell table:formula="of:=SIN(PI()*[.F3]/20)/SIN(PI()/20)/[.F3]" office:value-type="float" office:value="0.90402940426804" calcext:value-type="float">
            <text:p>0,90402940426804</text:p>
          </table:table-cell>
          <table:table-cell table:formula="of:=SIN(PI()*[.G3]/20)/SIN(PI()/20)/[.G3]" office:value-type="float" office:value="0.861933881990018" calcext:value-type="float">
            <text:p>0,861933881990018</text:p>
          </table:table-cell>
          <table:table-cell table:formula="of:=SIN(PI()*[.H3]/20)/SIN(PI()/20)/[.H3]" office:value-type="float" office:value="0.813673932275021" calcext:value-type="float">
            <text:p>0,813673932275021</text:p>
          </table:table-cell>
          <table:table-cell table:formula="of:=SIN(PI()*[.I3]/20)/SIN(PI()/20)/[.I3]" office:value-type="float" office:value="0.7599480364274" calcext:value-type="float">
            <text:p>0,759948036427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, мс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tau, мкс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\Delta \nu, кГц</text:p>
          </table:table-cell>
          <table:table-cell office:value-type="float" office:value="49.71" calcext:value-type="float">
            <text:p>49,71</text:p>
          </table:table-cell>
          <table:table-cell office:value-type="float" office:value="40.18" calcext:value-type="float">
            <text:p>40,18</text:p>
          </table:table-cell>
          <table:table-cell office:value-type="float" office:value="25.03" calcext:value-type="float">
            <text:p>25,03</text:p>
          </table:table-cell>
          <table:table-cell office:value-type="float" office:value="13.36" calcext:value-type="float">
            <text:p>13,36</text:p>
          </table:table-cell>
          <table:table-cell office:value-type="float" office:value="10.07" calcext:value-type="float">
            <text:p>10,07</text:p>
          </table:table-cell>
          <table:table-cell office:value-type="float" office:value="6.629" calcext:value-type="float">
            <text:p>6,629</text:p>
          </table:table-cell>
          <table:table-cell office:value-type="float" office:value="5.079" calcext:value-type="float">
            <text:p>5,079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\tau, мкс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, мкс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\delta \nu, кГц</text:p>
          </table:table-cell>
          <table:table-cell office:value-type="float" office:value="9.959" calcext:value-type="float">
            <text:p>9,959</text:p>
          </table:table-cell>
          <table:table-cell office:value-type="float" office:value="1.984" calcext:value-type="float">
            <text:p>1,984</text:p>
          </table:table-cell>
          <table:table-cell office:value-type="float" office:value="0.964" calcext:value-type="float">
            <text:p>0,964</text:p>
          </table:table-cell>
          <table:table-cell office:value-type="float" office:value="0.501" calcext:value-type="float">
            <text:p>0,501</text:p>
          </table:table-cell>
          <table:table-cell office:value-type="float" office:value="0.34" calcext:value-type="float">
            <text:p>0,34</text:p>
          </table:table-cell>
          <table:table-cell office:value-type="float" office:value="0.246" calcext:value-type="float">
            <text:p>0,246</text:p>
          </table:table-cell>
          <table:table-cell office:value-type="float" office:value="0.198" calcext:value-type="float">
            <text:p>0,198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Г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, %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_{осн}, мВ</text:p>
          </table:table-cell>
          <table:table-cell table:number-columns-repeated="3" office:value-type="float" office:value="688.8" calcext:value-type="float">
            <text:p>688,8</text:p>
          </table:table-cell>
          <table:table-cell office:value-type="float" office:value="688.3" calcext:value-type="float">
            <text:p>688,3</text:p>
          </table:table-cell>
          <table:table-cell table:number-columns-repeated="3" office:value-type="float" office:value="688.8" calcext:value-type="float">
            <text:p>688,8</text:p>
          </table:table-cell>
          <table:table-cell/>
        </table:table-row>
        <table:table-row table:style-name="ro1">
          <table:table-cell office:value-type="string" calcext:value-type="string">
            <text:p>a_{бок}, мВ</text:p>
          </table:table-cell>
          <table:table-cell office:value-type="float" office:value="33.23" calcext:value-type="float">
            <text:p>33,23</text:p>
          </table:table-cell>
          <table:table-cell office:value-type="float" office:value="66.56" calcext:value-type="float">
            <text:p>66,56</text:p>
          </table:table-cell>
          <table:table-cell office:value-type="float" office:value="133.2" calcext:value-type="float">
            <text:p>133,2</text:p>
          </table:table-cell>
          <table:table-cell office:value-type="float" office:value="168.6" calcext:value-type="float">
            <text:p>168,6</text:p>
          </table:table-cell>
          <table:table-cell office:value-type="float" office:value="199.9" calcext:value-type="float">
            <text:p>199,9</text:p>
          </table:table-cell>
          <table:table-cell office:value-type="float" office:value="266.5" calcext:value-type="float">
            <text:p>266,5</text:p>
          </table:table-cell>
          <table:table-cell office:value-type="float" office:value="337.2" calcext:value-type="float">
            <text:p>337,2</text:p>
          </table:table-cell>
          <table:table-cell/>
        </table:table-row>
        <table:table-row table:style-name="ro1">
          <table:table-cell office:value-type="string" calcext:value-type="string">
            <text:p>(a_{бок}/a_{осн})^{эксп}</text:p>
          </table:table-cell>
          <table:table-cell table:formula="of:=[.B26]/[.B25]" office:value-type="float" office:value="0.0482433217189315" calcext:value-type="float">
            <text:p>0,0482433217189315</text:p>
          </table:table-cell>
          <table:table-cell table:formula="of:=[.C26]/[.C25]" office:value-type="float" office:value="0.0966318234610918" calcext:value-type="float">
            <text:p>0,0966318234610918</text:p>
          </table:table-cell>
          <table:table-cell table:formula="of:=[.D26]/[.D25]" office:value-type="float" office:value="0.193379790940767" calcext:value-type="float">
            <text:p>0,193379790940767</text:p>
          </table:table-cell>
          <table:table-cell table:formula="of:=[.E26]/[.E25]" office:value-type="float" office:value="0.244951329362197" calcext:value-type="float">
            <text:p>0,244951329362197</text:p>
          </table:table-cell>
          <table:table-cell table:formula="of:=[.F26]/[.F25]" office:value-type="float" office:value="0.290214866434379" calcext:value-type="float">
            <text:p>0,290214866434379</text:p>
          </table:table-cell>
          <table:table-cell table:formula="of:=[.G26]/[.G25]" office:value-type="float" office:value="0.386904761904762" calcext:value-type="float">
            <text:p>0,386904761904762</text:p>
          </table:table-cell>
          <table:table-cell table:formula="of:=[.H26]/[.H25]" office:value-type="float" office:value="0.489547038327526" calcext:value-type="float">
            <text:p>0,489547038327526</text:p>
          </table:table-cell>
          <table:table-cell/>
        </table:table-row>
        <table:table-row table:style-name="ro1">
          <table:table-cell office:value-type="string" calcext:value-type="string">
            <text:p>(a_{бок}/a_{осн})^{теор}</text:p>
          </table:table-cell>
          <table:table-cell table:formula="of:=[.B24]/200" office:value-type="float" office:value="0.05" calcext:value-type="float">
            <text:p>0,05</text:p>
          </table:table-cell>
          <table:table-cell table:formula="of:=[.C24]/200" office:value-type="float" office:value="0.1" calcext:value-type="float">
            <text:p>0,1</text:p>
          </table:table-cell>
          <table:table-cell table:formula="of:=[.D24]/200" office:value-type="float" office:value="0.2" calcext:value-type="float">
            <text:p>0,2</text:p>
          </table:table-cell>
          <table:table-cell table:formula="of:=[.E24]/200" office:value-type="float" office:value="0.25" calcext:value-type="float">
            <text:p>0,25</text:p>
          </table:table-cell>
          <table:table-cell table:formula="of:=[.F24]/200" office:value-type="float" office:value="0.3" calcext:value-type="float">
            <text:p>0,3</text:p>
          </table:table-cell>
          <table:table-cell table:formula="of:=[.G24]/200" office:value-type="float" office:value="0.4" calcext:value-type="float">
            <text:p>0,4</text:p>
          </table:table-cell>
          <table:table-cell table:formula="of:=[.H24]/200" office:value-type="float" office:value="0.5" calcext:value-type="float">
            <text:p>0,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5:40:29.891565733</meta:creation-date>
    <dc:date>2025-09-15T16:10:27.028536911</dc:date>
    <meta:editing-duration>PT6M48S</meta:editing-duration>
    <meta:editing-cycles>1</meta:editing-cycles>
    <meta:document-statistic meta:table-count="1" meta:cell-count="132" meta:object-count="0"/>
    <meta:generator>LibreOffice/25.8.0.4$Linux_X86_64 LibreOffice_project/580$Build-4</meta:generator>
  </office:meta>
</office:document-meta>
</file>